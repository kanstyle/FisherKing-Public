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1.9445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1.268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it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3]+10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4]+10"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5]+10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6]+10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7]+10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8]+10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9]+10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10]+10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11]+10"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12]+10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3]+10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4]+10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5]+10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16]+10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7]+10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18]+10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19]+10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20]+10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21]+10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22]+10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23]+10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24]+10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25]+10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26]+10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27]+10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28]+10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29]+10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30]+10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31]+10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32]+10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33]+10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34]+10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35]+10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36]+10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37]+10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38]+10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39]+10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40]+10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41]+10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42]+10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43]+10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44]+10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45]+10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46]+10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47]+10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48]+10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49]+10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50]+10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51]+10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52]+10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53]+10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54]+10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5]+10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6]+10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57]+10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58]+10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59]+10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60]+10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1]+10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62]+10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63]+10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64]+10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65]+10"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66]+10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67]+10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68]+10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69]+10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70]+10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71]+10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72]+10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3]+10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4]+10"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5]+10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76]+10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7]+10"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8]+10"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9]+10"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80]+10"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81]+10"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82]+10"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83]+10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84]+10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85]+10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86]+10"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87]+10"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88]+10"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89]+10"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90]+10"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91]+10"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92]+10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122]+10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131]+10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132]+10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33]+10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134]+10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135]+10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136]+10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137]+10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141]+10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42]+10"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143]+10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144]+10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145]+10"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46]+10"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147]+10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148]+10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49]+10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150]+10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151]+10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152]+10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163]+10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168]+10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169]+10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170]+10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171]+10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72]+10"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173]+10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174]+10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175]+10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76]+10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177]+10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178]+10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179]+10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180]+10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181]+10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182]+10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183]+10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184]+10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192]+10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193]+10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195]+10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196]+10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197]+10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198]+10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199]+10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200]+10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201]+10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202]+10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203]+10"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204]+10"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205]+10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 style:data-style-name="N2" text:time-value="23:53:58.2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6:12:54.051000000</meta:creation-date>
    <dc:date>2025-05-05T14:16:26.693000000</dc:date>
    <meta:editing-duration>P3DT8H48M21S</meta:editing-duration>
    <meta:editing-cycles>5</meta:editing-cycles>
    <meta:generator>LibreOffice/24.8.6.2$Windows_X86_64 LibreOffice_project/6d98ba145e9a8a39fc57bcc76981d1fb1316c60c</meta:generator>
    <meta:document-statistic meta:table-count="1" meta:cell-count="413" meta:object-count="0"/>
  </office:meta>
</office:document-meta>
</file>